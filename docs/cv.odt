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irst_20_paragraph">
      <style:text-properties fo:font-size="16pt" fo:font-weight="bold" officeooo:rsid="001bed9d" officeooo:paragraph-rsid="001bed9d" style:font-size-asian="16pt" style:font-weight-asian="bold" style:font-size-complex="16pt" style:font-weight-complex="bold"/>
    </style:style>
    <style:style style:name="P2" style:family="paragraph" style:parent-style-name="Heading_20_2">
      <style:text-properties fo:font-style="normal" style:font-style-asian="normal" style:font-style-complex="normal"/>
    </style:style>
    <style:style style:name="P3" style:family="paragraph" style:parent-style-name="Text_20_body" style:list-style-name="L1">
      <style:paragraph-properties fo:margin-top="0in" fo:margin-bottom="0in" style:contextual-spacing="false"/>
    </style:style>
    <style:style style:name="P4" style:family="paragraph" style:parent-style-name="Heading_20_3">
      <style:text-properties fo:font-size="12pt" style:font-size-asian="12pt" style:font-size-complex="12pt"/>
    </style:style>
    <style:style style:name="P5" style:family="paragraph" style:parent-style-name="Text_20_body" style:list-style-name="L2">
      <style:paragraph-properties fo:margin-top="0in" fo:margin-bottom="0in" style:contextual-spacing="false"/>
    </style:style>
    <style:style style:name="P6" style:family="paragraph" style:parent-style-name="Text_20_body" style:list-style-name="L3">
      <style:paragraph-properties fo:margin-top="0in" fo:margin-bottom="0in" style:contextual-spacing="false"/>
    </style:style>
    <style:style style:name="P7" style:family="paragraph" style:parent-style-name="Text_20_body" style:list-style-name="L4">
      <style:paragraph-properties fo:margin-top="0in" fo:margin-bottom="0in" style:contextual-spacing="false"/>
    </style:style>
    <style:style style:name="P8" style:family="paragraph" style:parent-style-name="Text_20_body" style:list-style-name="L5">
      <style:paragraph-properties fo:margin-top="0in" fo:margin-bottom="0in" style:contextual-spacing="false"/>
    </style:style>
    <style:style style:name="P9" style:family="paragraph" style:parent-style-name="Heading_20_4">
      <style:text-properties fo:font-style="normal" fo:font-weight="bold" style:font-style-asian="normal" style:font-weight-asian="bold" style:font-style-complex="normal" style:font-weight-complex="bold"/>
    </style:style>
    <style:style style:name="P10" style:family="paragraph" style:parent-style-name="Text_20_body" style:list-style-name="L6">
      <style:paragraph-properties fo:margin-top="0in" fo:margin-bottom="0in" style:contextual-spacing="false"/>
    </style:style>
    <style:style style:name="P11" style:family="paragraph" style:parent-style-name="Text_20_body" style:list-style-name="L7">
      <style:paragraph-properties fo:margin-top="0in" fo:margin-bottom="0in" style:contextual-spacing="false"/>
    </style:style>
    <style:style style:name="P12" style:family="paragraph" style:parent-style-name="Heading_20_4">
      <style:text-properties fo:font-style="normal" style:font-style-asian="normal" style:font-style-complex="normal"/>
    </style:style>
    <style:style style:name="P13" style:family="paragraph" style:parent-style-name="Text_20_body" style:list-style-name="L8">
      <style:paragraph-properties fo:margin-top="0in" fo:margin-bottom="0in" style:contextual-spacing="false"/>
    </style:style>
    <style:style style:name="P14" style:family="paragraph" style:parent-style-name="Text_20_body" style:list-style-name="L9">
      <style:paragraph-properties fo:margin-top="0in" fo:margin-bottom="0in" style:contextual-spacing="false"/>
    </style:style>
    <style:style style:name="P15" style:family="paragraph" style:parent-style-name="Text_20_body" style:list-style-name="L10">
      <style:paragraph-properties fo:margin-top="0in" fo:margin-bottom="0in" style:contextual-spacing="false"/>
    </style:style>
    <style:style style:name="P16" style:family="paragraph" style:parent-style-name="First_20_paragraph">
      <style:paragraph-properties fo:margin-top="0in" fo:margin-bottom="0in" style:contextual-spacing="false"/>
      <style:text-properties officeooo:paragraph-rsid="001e65ec"/>
    </style:style>
    <style:style style:name="P17" style:family="paragraph" style:parent-style-name="First_20_paragraph">
      <style:paragraph-properties fo:margin-top="0in" fo:margin-bottom="0in" style:contextual-spacing="false"/>
      <style:text-properties officeooo:paragraph-rsid="00216817"/>
    </style:style>
    <style:style style:name="T1" style:family="text">
      <style:text-properties fo:font-style="italic" style:font-style-asian="italic" style:font-style-complex="italic"/>
    </style:style>
    <style:style style:name="T2" style:family="text">
      <style:text-properties officeooo:rsid="001bed9d"/>
    </style:style>
    <style:style style:name="T3" style:family="text">
      <style:text-properties officeooo:rsid="002128bd"/>
    </style:style>
    <style:style style:name="T4" style:family="text">
      <style:text-properties fo:font-weight="bold" style:font-weight-asian="bold" style:font-weight-complex="bol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ohn Sipahioglu</text:p>
      <text:p text:style-name="First_20_paragraph">Instructor - Computer Science - Stark State College</text:p>
      <text:p text:style-name="Text_20_body"><text:span text:style-name="T1">Academic Contact Information:</text:span><text:line-break/>jsipahio@kent.edu<text:line-break/>Department of Computer Science<text:line-break/>Kent State University<text:line-break/>Kent, Ohio, USA 44242</text:p>
      <text:p text:style-name="Text_20_body"><text:span text:style-name="T1">Teaching Contact Information:</text:span><text:line-break/>jsipahioglu@starkstate.edu<text:line-break/>Department of Computer Science and Information Systems<text:line-break/>Stark State College<text:line-break/>North Canton, Ohio, USA 44720</text:p>
      <text:h text:style-name="P2" text:outline-level="2"><text:bookmark-start text:name="education"/>Education<text:bookmark-end text:name="education"/></text:h>
      <text:list text:style-name="L1">
        <text:list-item>
          <text:p text:style-name="P3">Ph.D. - Computer Science - Kent State University - In-progress</text:p>
        </text:list-item>
        <text:list-item>
          <text:p text:style-name="P3">M.S. - Computer Science - Kent State University - August 2024</text:p>
        </text:list-item>
        <text:list-item>
          <text:p text:style-name="P3">B.S. - Computer Science - Kent State University - May 2024</text:p>
        </text:list-item>
        <text:list-item>
          <text:p text:style-name="P3">B.A. - Mathematics - Kent State University - May 2024</text:p>
        </text:list-item>
      </text:list>
      <text:h text:style-name="P2" text:outline-level="2"><text:bookmark-start text:name="advisors"/>Advisors<text:bookmark-end text:name="advisors"/></text:h>
      <text:p text:style-name="First_20_paragraph">Prof. Jonathan I. Maletic (Ph.D., 2024 - Present)<text:line-break/>Dr. Younghun Chae (M.S., 2023 - 2024)</text:p>
      <text:h text:style-name="P2" text:outline-level="2"><text:bookmark-start text:name="research-statement"/>Research <text:bookmark-end text:name="research-statement"/><text:span text:style-name="T2">Interests</text:span></text:h>
      <text:p text:style-name="First_20_paragraph">Code reuse, design recovery, code quality, software evolution, technical debt, and maintenance</text:p>
      <text:p text:style-name="Text_20_body">I am currently contributing to the srcML infrastructure, which supports source code fact extraction, querying, transformation, and syntactic differencing. <text:span text:style-name="T3">I am also exploring ways to use the srcML infrastructure to identify technical debt in systems. </text:span></text:p>
      <text:h text:style-name="P4" text:outline-level="3"><text:bookmark-start text:name="projects"/>Projects<text:bookmark-end text:name="projects"/></text:h>
      <text:list text:style-name="L2">
        <text:list-item>
          <text:p text:style-name="P5"><text:span text:style-name="Source_5f_Text">srcML</text:span> - Contribute to writing grammars to add new languages to srcML and presently implementing parsing for Rust. The srcML tool wraps source code elements in XML tags to embed the abstract syntax tree into the source code. srcML serves as the base for other tools to query, difference, parse, and transform source code.</text:p>
        </text:list-item>
        <text:list-item>
          <text:p text:style-name="P5"><text:span text:style-name="Source_5f_Text">srcBind</text:span> - A tool for creating idiomatic bindings and wrappers of C (and eventually Rust) libraries in object-oriented languages, such as Python, C++ and Java.</text:p>
        </text:list-item>
        <text:list-item>
          <text:p text:style-name="P5"><text:span text:style-name="Source_5f_Text">srcDispatch</text:span> - Contribute to continued development and support of more language features in srcDispatch. srcDispatch is a SAX event dispatcher for srcML.</text:p>
        </text:list-item>
      </text:list>
      <text:h text:style-name="P2" text:outline-level="2"><text:bookmark-start text:name="academic-experience"/><text:soft-page-break/>Academic Experience<text:bookmark-end text:name="academic-experience"/></text:h>
      <text:list text:style-name="L3">
        <text:list-item>
          <text:p text:style-name="P6"><text:span text:style-name="T1">Instructor, Full Time: Computer Science</text:span> - Stark State College (August 2025 - Present)</text:p>
        </text:list-item>
        <text:list-item>
          <text:p text:style-name="P6"><text:span text:style-name="T1">Part Time Faculty: Computer Science</text:span> - Kent State University at Stark (August 2024 - Present)</text:p>
        </text:list-item>
        <text:list-item>
          <text:p text:style-name="P6"><text:span text:style-name="T1">Adjunct Instructor: Computer Science</text:span> - Stark State College (August 2024 - August 2025)</text:p>
        </text:list-item>
        <text:list-item>
          <text:p text:style-name="P6"><text:span text:style-name="T1">Tutor: Computer Science, Mathematics, Physics, Chemistry</text:span> - Kent State University at Stark (January 2022 - May 2024)</text:p>
        </text:list-item>
      </text:list>
      <text:h text:style-name="P2" text:outline-level="2"><text:bookmark-start text:name="industry-experience"/>Industry Experience<text:bookmark-end text:name="industry-experience"/></text:h>
      <text:list text:style-name="L4">
        <text:list-item>
          <text:p text:style-name="P7"><text:span text:style-name="T1">IT Coop</text:span> - PCC Airfoils (July 2022 - January 2023, June 2023 - August 2024)</text:p>
        </text:list-item>
      </text:list>
      <text:h text:style-name="P2" text:outline-level="2"><text:bookmark-start text:name="funding-awards"/>Funding Awards<text:bookmark-end text:name="funding-awards"/></text:h>
      <text:list text:style-name="L5">
        <text:list-item>
          <text:p text:style-name="P8">Summer Research Worker (May 2025 - August 2025) - Funded under NSF grant CNS 20-16465. Created markup specification to add the Rust programming language to srcML and contributed to srcDispatch to parse srcML</text:p>
        </text:list-item>
        <text:list-item>
          <text:p text:style-name="P8">Ohio Space Consortium Grant (August 2023 - May 2024) - Awarded $10,000 for research into potential benefits of updating protocols for securing Deep Space Network</text:p>
        </text:list-item>
        <text:list-item>
          <text:p text:style-name="P8">Choose Ohio First - Computer Science Scholarship (January 2022 - May 2024) - Awarded funds for undergraduate tuition as part of the COF-CS program</text:p>
        </text:list-item>
      </text:list>
      <text:h text:style-name="P2" text:outline-level="2"><text:bookmark-start text:name="publications-and-scholarly-works"/>Publications and Scholarly Works<text:bookmark-end text:name="publications-and-scholarly-works"/></text:h>
      <text:h text:style-name="P9" text:outline-level="4"><text:bookmark-start text:name="works-under-review-or-near-submission"/>Works Under Review or Near Submission<text:bookmark-end text:name="works-under-review-or-near-submission"/></text:h>
      <text:list text:style-name="L6">
        <text:list-item>
          <text:p text:style-name="P10">Al-Ramadan, F., Sipahioglu, J.A., Behler, J.A.C., Dragan, N., Decker, M.J., Collard, M.L., Maletic, J.I., “Should this Method be Static? Automatic Identification of Static Method Candidates”, submitted May 16th, 2026 to IEEE Transactions on Software Engineering (TSE).</text:p>
        </text:list-item>
        <text:list-item>
          <text:p text:style-name="P10">Sipahioglu, J.A., Al-Ramadan, F., Rossi, K.N., Behler, J.A.C., Decker, M.J., Collard, M.L., Maletic, J.I., “Reverse Engineering Object-Oriented Designs from C Systems”, to be submitted Fall 2026 to the 34th IEEE International Conference on Software Analysis, Evolution and Reengineering (SANER).</text:p>
        </text:list-item>
      </text:list>
      <text:h text:style-name="P9" text:outline-level="4"><text:bookmark-start text:name="accepted-and-to-appear"/>Accepted and to Appear<text:bookmark-end text:name="accepted-and-to-appear"/></text:h>
      <text:list text:style-name="L7">
        <text:list-item>
          <text:p text:style-name="P11">Sipahioglu, J.A., Behler, J.A.C., Testa, S., Al-Ramadan, A., Decker, M.J., Collard, M.L., Maletic, J.I., (2026) “nameCollector: Extracting Source Code Identifiers Along with their Types and Context”, in the Proceedings of 42nd IEEE International Conference on Software Maintenance &amp; Evolution (ICSME), Tool Demonstrations Track, Benevento, Italy, Sept 14 - 18, 5 pages. (TO APPEAR)</text:p>
        </text:list-item>
      </text:list>
      <text:h text:style-name="P9" text:outline-level="4"><text:bookmark-start text:name="publications-refereed"/>Publications (Refereed)<text:bookmark-end text:name="publications-refereed"/></text:h>
      <text:p text:style-name="First_20_paragraph">N/A</text:p>
      <text:h text:style-name="P12" text:outline-level="4"><text:bookmark-start text:name="theses"/><text:soft-page-break/>Theses<text:bookmark-end text:name="theses"/></text:h>
      <text:list text:style-name="L8">
        <text:list-item>
          <text:p text:style-name="P13">Sipahioglu, J.A., “Modernizing Deep Space Network Security”, M.S. Thesis, Kent State University, Department of Computer Science, August 2024.</text:p>
        </text:list-item>
      </text:list>
      <text:h text:style-name="P2" text:outline-level="2"><text:bookmark-start text:name="professional-activitiesservices"/>Professional Activities/Services<text:bookmark-end text:name="professional-activitiesservices"/></text:h>
      <text:h text:style-name="P12" text:outline-level="4"><text:bookmark-start text:name="conference-reviewer"/>Conference Reviewer<text:bookmark-end text:name="conference-reviewer"/></text:h>
      <text:list text:style-name="L9">
        <text:list-item>
          <text:p text:style-name="P14">2026 14th IEEE Working Conference on Software Visualization (VISSOFT) - Additional Reviewer</text:p>
        </text:list-item>
        <text:list-item>
          <text:p text:style-name="P14">2026 42nd IEEE International Conference on Software Maintenance and Evolution (ICSME ’26) - Additional Reviewer</text:p>
        </text:list-item>
        <text:list-item>
          <text:p text:style-name="P14">2026 34th IEEE/ACM International Conference on Program Comprehension (ICPC) - Additional Reviewer</text:p>
        </text:list-item>
      </text:list>
      <text:h text:style-name="P2" text:outline-level="2"><text:bookmark-start text:name="university-activitiesservices"/>University Activities/Services<text:bookmark-end text:name="university-activitiesservices"/></text:h>
      <text:list text:style-name="L10">
        <text:list-item>
          <text:p text:style-name="P15">2025 Choose Ohio First (COF) Poster Competition at Kent State University - Judged 6 computer science posters</text:p>
        </text:list-item>
        <text:list-item>
          <text:p text:style-name="P15">13th International Conference on Intelligent Human Computer Interaction (IHCI 2021) at Kent State University - Assisted with High School outreach workshop</text:p>
        </text:list-item>
      </text:list>
      <text:h text:style-name="P2" text:outline-level="2"><text:bookmark-start text:name="teaching"/>Teaching<text:bookmark-end text:name="teaching"/></text:h>
      <text:p text:style-name="P16"><text:span text:style-name="T4">Stark State College</text:span><text:line-break/><text:span text:style-name="T1">Summer 2026</text:span><text:line-break/>- CSE233 - C++ Programming - CSE234 </text:p>
      <text:p text:style-name="P16">- Advanced C++ Programming - CSE235 </text:p>
      <text:p text:style-name="P16">- Python Development </text:p>
      <text:p text:style-name="P17"><text:span text:style-name="T1">Spring 2026</text:span><text:line-break/>- CSE121 - Mobile Development Architecture<text:line-break/>- CSE122 - Programming Logic and Problem Solving<text:line-break/>- CSE233 - C++ Programming<text:line-break/>- CSE234 - Advanced C++ Programming<text:line-break/>- CFS137 - Computer Crime and Investigation<text:line-break/>- CFS258 - Cyber Forensics and Data Recovery<text:line-break/>- CFS287 - Network Forensics<text:line-break/><text:span text:style-name="T1">Fall 2025</text:span><text:line-break/>- CSE122 - Programming Logic and Problem Solving<text:line-break/>- CSE233 - C++ Programming<text:line-break/>- NET220 - UNIX/Linux Operating Environments<text:line-break/>- CFS210 - Cyber Defense Fundamentals<text:line-break/>- CFS257 - File System Analysis<text:line-break/>- CFS258 - Cyber Forensics and Data Recovery</text:p>
      <text:p text:style-name="P17"><text:line-break/><text:soft-page-break/><text:span text:style-name="T1">Summer 2025</text:span><text:line-break/>- WDD226 - Web Development with PHP and MySQL<text:line-break/><text:span text:style-name="T1">Spring 2025</text:span><text:line-break/>- CFS257 - File System Analysis<text:line-break/>- CFS258 - Cyber Forensics and Data Recovery<text:line-break/>- CFS287 - Network Forensics<text:line-break/><text:span text:style-name="T1">Fall 2024</text:span><text:line-break/>- CFS137 - Computer Crime and Investigation</text:p>
      <text:p text:style-name="Text_20_body"><text:span text:style-name="T4">Kent State University at Stark</text:span><text:line-break/><text:span text:style-name="T1">Spring 2025</text:span><text:line-break/>- CS13001 Computer Science I - Programming and Problem Solving (Lab Section)<text:line-break/>- CS23001 Computer Science II - Data Structures and Abstraction (Lab Section)<text:line-break/><text:span text:style-name="T1">Fall 2024</text:span><text:line-break/>- CS13001 Computer Science I - Programming and Problem Solving (Lab Section)<text:line-break/>- CS23001 Computer Science II - Data Structures and Abstraction (Lab Sec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Caption" style:family="paragraph" style:parent-style-name="Caption" style:class="extra"/>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chapter">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chapter">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chapter">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chapter">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Source_5f_Text" style:display-name="Source_Text" style:family="text">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KeywordTok" style:family="text">
      <style:text-properties fo:color="#007020" loext:opacity="100%" fo:font-weight="bold"/>
    </style:style>
    <style:style style:name="DataTypeTok" style:family="text">
      <style:text-properties fo:color="#902000" loext:opacity="100%"/>
    </style:style>
    <style:style style:name="DecValTok" style:family="text">
      <style:text-properties fo:color="#40a070" loext:opacity="100%"/>
    </style:style>
    <style:style style:name="BaseNTok" style:family="text">
      <style:text-properties fo:color="#40a070" loext:opacity="100%"/>
    </style:style>
    <style:style style:name="FloatTok" style:family="text">
      <style:text-properties fo:color="#40a070" loext:opacity="100%"/>
    </style:style>
    <style:style style:name="ConstantTok" style:family="text">
      <style:text-properties fo:color="#880000" loext:opacity="100%"/>
    </style:style>
    <style:style style:name="CharTok" style:family="text">
      <style:text-properties fo:color="#4070a0" loext:opacity="100%"/>
    </style:style>
    <style:style style:name="SpecialCharTok" style:family="text">
      <style:text-properties fo:color="#4070a0" loext:opacity="100%"/>
    </style:style>
    <style:style style:name="StringTok" style:family="text">
      <style:text-properties fo:color="#4070a0" loext:opacity="100%"/>
    </style:style>
    <style:style style:name="VerbatimStringTok" style:family="text">
      <style:text-properties fo:color="#4070a0" loext:opacity="100%"/>
    </style:style>
    <style:style style:name="SpecialStringTok" style:family="text">
      <style:text-properties fo:color="#bb6688" loext:opacity="100%"/>
    </style:style>
    <style:style style:name="ImportTok" style:family="text">
      <style:text-properties fo:color="#008000" loext:opacity="100%" fo:font-weight="bold"/>
    </style:style>
    <style:style style:name="CommentTok" style:family="text">
      <style:text-properties fo:color="#60a0b0" loext:opacity="100%" fo:font-style="italic"/>
    </style:style>
    <style:style style:name="DocumentationTok" style:family="text">
      <style:text-properties fo:color="#ba2121" loext:opacity="100%" fo:font-style="italic"/>
    </style:style>
    <style:style style:name="AnnotationTok" style:family="text">
      <style:text-properties fo:color="#60a0b0" loext:opacity="100%" fo:font-style="italic" fo:font-weight="bold"/>
    </style:style>
    <style:style style:name="CommentVarTok" style:family="text">
      <style:text-properties fo:color="#60a0b0" loext:opacity="100%" fo:font-style="italic" fo:font-weight="bold"/>
    </style:style>
    <style:style style:name="OtherTok" style:family="text">
      <style:text-properties fo:color="#007020" loext:opacity="100%"/>
    </style:style>
    <style:style style:name="FunctionTok" style:family="text">
      <style:text-properties fo:color="#06287e" loext:opacity="100%"/>
    </style:style>
    <style:style style:name="VariableTok" style:family="text">
      <style:text-properties fo:color="#19177c" loext:opacity="100%"/>
    </style:style>
    <style:style style:name="ControlFlowTok" style:family="text">
      <style:text-properties fo:color="#007020" loext:opacity="100%" fo:font-weight="bold"/>
    </style:style>
    <style:style style:name="OperatorTok" style:family="text">
      <style:text-properties fo:color="#666666" loext:opacity="100%"/>
    </style:style>
    <style:style style:name="BuiltInTok" style:family="text">
      <style:text-properties fo:color="#008000" loext:opacity="100%"/>
    </style:style>
    <style:style style:name="ExtensionTok" style:family="text"/>
    <style:style style:name="PreprocessorTok" style:family="text">
      <style:text-properties fo:color="#bc7a00" loext:opacity="100%"/>
    </style:style>
    <style:style style:name="AttributeTok" style:family="text">
      <style:text-properties fo:color="#7d9029" loext:opacity="100%"/>
    </style:style>
    <style:style style:name="RegionMarkerTok" style:family="text"/>
    <style:style style:name="InformationTok" style:family="text">
      <style:text-properties fo:color="#60a0b0" loext:opacity="100%" fo:font-style="italic" fo:font-weight="bold"/>
    </style:style>
    <style:style style:name="WarningTok" style:family="text">
      <style:text-properties fo:color="#60a0b0" loext:opacity="100%" fo:font-style="italic" fo:font-weight="bold"/>
    </style:style>
    <style:style style:name="AlertTok" style:family="text">
      <style:text-properties fo:color="#ff0000" loext:opacity="100%" fo:font-weight="bold"/>
    </style:style>
    <style:style style:name="ErrorTok" style:family="text">
      <style:text-properties fo:color="#ff0000" loext:opacity="100%" fo:font-weight="bold"/>
    </style:style>
    <style:style style:name="NormalTok"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paragraph-rsid="0022915b"/>
    </style:style>
    <style:style style:name="MT1" style:family="text">
      <style:text-properties officeooo:rsid="0022915b"/>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ackground-color="transparent" style:dynamic-spacing="true" draw:fill="none"/>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footer>
        <text:p text:style-name="MP1"><text:span text:style-name="MT1">John Sipahioglu<text:tab/></text:span><text:page-number text:select-page="current">4</text:page-number><text:tab/><text:date style:data-style-name="N37" text:date-value="2026-07-15T14:09:11.306861406">07/15/26</text:date> </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8.7.3$Linux_X86_64 LibreOffice_project/580$Build-3</meta:generator>
    <dc:title/>
    <dc:description/>
    <dc:subject/>
    <meta:keyword/>
    <meta:initial-creator/>
    <meta:creation-date>2026-07-15T17:55:06Z</meta:creation-date>
    <dc:date>2026-07-15T14:09:11.243225607</dc:date>
    <meta:editing-duration>PT13M53S</meta:editing-duration>
    <meta:editing-cycles>8</meta:editing-cycles>
    <meta:document-statistic meta:table-count="0" meta:image-count="0" meta:object-count="0" meta:page-count="4" meta:paragraph-count="55" meta:word-count="898" meta:character-count="5862" meta:non-whitespace-character-count="5037"/>
  </office:meta>
</office:document-meta>
</file>